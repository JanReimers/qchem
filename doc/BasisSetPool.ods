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81"/>
    <style:style style:name="ce4" style:family="table-cell" style:parent-style-name="Default" style:data-style-name="N8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N1=</text:p>
          </table:table-cell>
          <table:table-cell office:value-type="string" calcext:value-type="string">
            <text:p>emax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A4]*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POWER([.C4]/[.B4];1/[.D4] )" office:value-type="float" office:value="1.34928284767356" calcext:value-type="float">
            <text:p>1.34928284767356</text:p>
          </table:table-cell>
          <table:table-cell office:value-type="float" office:value="1.2" calcext:value-type="float">
            <text:p>1.2</text:p>
          </table:table-cell>
          <table:table-cell table:formula="of:=6+2*FLOOR(POWER([.A4];0.4))" office:value-type="float" office:value="8" calcext:value-type="float">
            <text:p>8</text:p>
          </table:table-cell>
          <table:table-cell table:formula="of:=[.B4]*POWER([.F4];[.G4]-1)" office:value-type="float" office:value="0.8957952" calcext:value-type="float">
            <text:p>0.89579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A5]*5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POWER([.C5]/[.B5];1/[.D5] )" office:value-type="float" office:value="1.69864646463425" calcext:value-type="float">
            <text:p>1.69864646463425</text:p>
          </table:table-cell>
          <table:table-cell table:formula="of:=[.F4]" office:value-type="float" office:value="1.2" calcext:value-type="float">
            <text:p>1.2</text:p>
          </table:table-cell>
          <table:table-cell table:formula="of:=6+2*FLOOR(POWER([.A5];0.4))" office:value-type="float" office:value="10" calcext:value-type="float">
            <text:p>10</text:p>
          </table:table-cell>
          <table:table-cell table:formula="of:=[.B5]*POWER([.F5];[.G5]-1)" office:value-type="float" office:value="1.289945088" calcext:value-type="float">
            <text:p>1.289945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table:formula="of:=[.A6]*5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formula="of:=POWER([.C6]/[.B6];1/[.D6] )" office:value-type="float" office:value="1.53412740463439" calcext:value-type="float">
            <text:p>1.53412740463439</text:p>
          </table:table-cell>
          <table:table-cell table:formula="of:=[.F5]" office:value-type="float" office:value="1.2" calcext:value-type="float">
            <text:p>1.2</text:p>
          </table:table-cell>
          <table:table-cell table:formula="of:=6+2*FLOOR(POWER([.A6];0.4))" office:value-type="float" office:value="12" calcext:value-type="float">
            <text:p>12</text:p>
          </table:table-cell>
          <table:table-cell table:formula="of:=[.B6]*POWER([.F6];[.G6]-1)" office:value-type="float" office:value="1.85752092672" calcext:value-type="float">
            <text:p>1.85752092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table:formula="of:=[.A7]*5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formula="of:=POWER([.C7]/[.B7];1/[.D7] )" office:value-type="float" office:value="1.44971548248589" calcext:value-type="float">
            <text:p>1.44971548248589</text:p>
          </table:table-cell>
          <table:table-cell table:formula="of:=[.F6]" office:value-type="float" office:value="1.2" calcext:value-type="float">
            <text:p>1.2</text:p>
          </table:table-cell>
          <table:table-cell table:formula="of:=6+2*FLOOR(POWER([.A7];0.4))" office:value-type="float" office:value="14" calcext:value-type="float">
            <text:p>14</text:p>
          </table:table-cell>
          <table:table-cell table:formula="of:=[.B7]*POWER([.F7];[.G7]-1)" office:value-type="float" office:value="2.6748301344768" calcext:value-type="float">
            <text:p>2.67483013447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.25</text:p>
          </table:table-cell>
          <table:table-cell table:formula="of:=[.A8]*5"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table:formula="of:=POWER([.C8]/[.B8];1/[.D8] )" office:value-type="float" office:value="1.50663019029467" calcext:value-type="float">
            <text:p>1.50663019029467</text:p>
          </table:table-cell>
          <table:table-cell table:formula="of:=[.F7]" office:value-type="float" office:value="1.2" calcext:value-type="float">
            <text:p>1.2</text:p>
          </table:table-cell>
          <table:table-cell table:formula="of:=6+2*FLOOR(POWER([.A8];0.4))" office:value-type="float" office:value="16" calcext:value-type="float">
            <text:p>16</text:p>
          </table:table-cell>
          <table:table-cell table:formula="of:=[.B8]*POWER([.F8];[.G8]-1)" office:value-type="float" office:value="3.85175539364659" calcext:value-type="float">
            <text:p>3.851755393646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5" calcext:value-type="float">
            <text:p>0.25</text:p>
          </table:table-cell>
          <table:table-cell table:formula="of:=[.A9]*5"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  <table:table-cell table:formula="of:=POWER([.C9]/[.B9];1/[.D9] )" office:value-type="float" office:value="1.51837403312557" calcext:value-type="float">
            <text:p>1.51837403312557</text:p>
          </table:table-cell>
          <table:table-cell office:value-type="float" office:value="1.2" calcext:value-type="float">
            <text:p>1.2</text:p>
          </table:table-cell>
          <table:table-cell office:value-type="float" office:value="40" calcext:value-type="float">
            <text:p>40</text:p>
          </table:table-cell>
          <table:table-cell table:formula="of:=[.B9]*POWER([.F9];[.G9]-1)" office:value-type="float" office:value="306.202409993559" calcext:value-type="float">
            <text:p>306.20240999355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500" calcext:value-type="float">
            <text:p>500</text:p>
          </table:table-cell>
          <table:table-cell office:value-type="float" office:value="1.2" calcext:value-type="float">
            <text:p>1.2</text:p>
          </table:table-cell>
          <table:table-cell table:formula="of:=FLOOR(LN([.C13]/[.B13])/LN([.D13]))" office:value-type="float" office:value="41" calcext:value-type="float">
            <text:p>41</text:p>
          </table:table-cell>
          <table:table-cell table:formula="of:=[.E13]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E$13]-35+[.A14]/4" office:value-type="float" office:value="6.25" calcext:value-type="float">
            <text:p>6.25</text:p>
          </table:table-cell>
          <table:table-cell table:formula="of:=[.F$13]-25+([.A14])/4" office:value-type="float" office:value="16.25" calcext:value-type="float">
            <text:p>16.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[.E$13]-33+([.A15]-1)/3" office:value-type="float" office:value="11" calcext:value-type="float">
            <text:p>11</text:p>
          </table:table-cell>
          <table:table-cell table:formula="of:=[.F$13]-25+([.A15])/4" office:value-type="float" office:value="18.5" calcext:value-type="float">
            <text:p>18.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formula="of:=[.E$13]-33+([.A16]-1)/3" office:value-type="float" office:value="14.3333333333333" calcext:value-type="float">
            <text:p>14.3333333333333</text:p>
          </table:table-cell>
          <table:table-cell table:formula="of:=[.F$13]-25+([.A16])/4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E$13]-33+([.A17]-1)/3" office:value-type="float" office:value="21" calcext:value-type="float">
            <text:p>21</text:p>
          </table:table-cell>
          <table:table-cell table:formula="of:=[.F$13]-25+([.A17])/4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table:formula="of:=[.E$13]-33+([.A18]-1)/3" office:value-type="float" office:value="34.3333333333333" calcext:value-type="float">
            <text:p>34.3333333333333</text:p>
          </table:table-cell>
          <table:table-cell table:formula="of:=[.F$13]-25+([.A18])/4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  <table:table-cell table:formula="of:=[.E$13]-33+([.A19]-1)/3" office:value-type="float" office:value="38.3333333333333" calcext:value-type="float">
            <text:p>38.3333333333333</text:p>
          </table:table-cell>
          <table:table-cell table:formula="of:=[.F$13]-25+([.A19])/4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formula="of:=[.E$13]-33+([.A20]-1)/3" office:value-type="float" office:value="41" calcext:value-type="float">
            <text:p>41</text:p>
          </table:table-cell>
          <table:table-cell table:formula="of:=[.F$13]-25+([.A20])/4" office:value-type="float" office:value="41" calcext:value-type="float">
            <text:p>4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-14+sqrt(Z/100)*14. – 3*ltri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$B24]-14*(1-SQRT([.A24]/100)) - 3" office:value-type="float" office:value="12.9798989873223" calcext:value-type="float">
            <text:p>12.9798989873223</text:p>
          </table:table-cell>
          <table:table-cell table:formula="of:=[.$B24]-[.D$23]+[.$A24]*[.D$23]/100 - 3" office:value-type="float" office:value="12.26" calcext:value-type="float">
            <text:p>12.26</text:p>
          </table:table-cell>
          <table:table-cell table:formula="of:=[.$B24]-[.E$23]+[.$A24]*[.E$23]/100 - 3" office:value-type="float" office:value="10.3" calcext:value-type="float">
            <text:p>10.3</text:p>
          </table:table-cell>
          <table:table-cell table:formula="of:=[.$B24]-[.F$23]+[.$A24]*[.F$23]/100 - 3" office:value-type="float" office:value="13.24" calcext:value-type="float">
            <text:p>13.24</text:p>
          </table:table-cell>
          <table:table-cell table:formula="of:=[.$B24]-[.G$23]+[.$A24]*[.G$23]/100 - 3" office:value-type="float" office:value="14.22" calcext:value-type="float">
            <text:p>14.2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$B25]-14*(1-SQRT([.A25]/100)) - 3" office:value-type="float" office:value="17.2609903369994" calcext:value-type="float">
            <text:p>17.2609903369994</text:p>
          </table:table-cell>
          <table:table-cell table:formula="of:=[.$B25]-[.D$23]+[.$A25]*[.D$23]/100 - 3" office:value-type="float" office:value="14.6" calcext:value-type="float">
            <text:p>14.6</text:p>
          </table:table-cell>
          <table:table-cell table:formula="of:=[.$B25]-[.E$23]+[.$A25]*[.E$23]/100 - 3" office:value-type="float" office:value="13" calcext:value-type="float">
            <text:p>13</text:p>
          </table:table-cell>
          <table:table-cell table:formula="of:=[.$B25]-[.F$23]+[.$A25]*[.F$23]/100 - 3" office:value-type="float" office:value="15.4" calcext:value-type="float">
            <text:p>15.4</text:p>
          </table:table-cell>
          <table:table-cell table:formula="of:=[.$B25]-[.G$23]+[.$A25]*[.G$23]/100 - 3" office:value-type="float" office:value="16.2" calcext:value-type="float">
            <text:p>16.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[.$B26]-14*(1-SQRT([.A26]/100)) - 3" office:value-type="float" office:value="24.1331641275056" calcext:value-type="float">
            <text:p>24.1331641275056</text:p>
          </table:table-cell>
          <table:table-cell table:formula="of:=[.$B26]-[.D$23]+[.$A26]*[.D$23]/100 - 3" office:value-type="float" office:value="23.44" calcext:value-type="float">
            <text:p>23.44</text:p>
          </table:table-cell>
          <table:table-cell table:formula="of:=[.$B26]-[.E$23]+[.$A26]*[.E$23]/100 - 3" office:value-type="float" office:value="23.2" calcext:value-type="float">
            <text:p>23.2</text:p>
          </table:table-cell>
          <table:table-cell table:formula="of:=[.$B26]-[.F$23]+[.$A26]*[.F$23]/100 - 3" office:value-type="float" office:value="23.56" calcext:value-type="float">
            <text:p>23.56</text:p>
          </table:table-cell>
          <table:table-cell table:formula="of:=[.$B26]-[.G$23]+[.$A26]*[.G$23]/100 - 3" office:value-type="float" office:value="23.68" calcext:value-type="float">
            <text:p>23.68</text:p>
          </table:table-cell>
          <table:table-cell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1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n (88)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ltrim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basis</text:p>
          </table:table-cell>
          <table:table-cell office:value-type="string" calcext:value-type="string">
            <text:p>S emax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2-V/K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Niter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17" calcext:value-type="float">
            <text:p>17</text:p>
          </table:table-cell>
          <table:table-cell office:value-type="float" office:value="149.408" calcext:value-type="float">
            <text:p>149.408</text:p>
          </table:table-cell>
          <table:table-cell office:value-type="string" calcext:value-type="string">
            <text:p>0.20(ppm)</text:p>
          </table:table-cell>
          <table:table-cell office:value-type="float" office:value="0.0000013" calcext:value-type="float">
            <text:p>1.30E-06</text:p>
          </table:table-cell>
          <table:table-cell office:value-type="float" office:value="0.0000061" calcext:value-type="float">
            <text:p>6.10E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44.95(ppb)</text:p>
          </table:table-cell>
          <table:table-cell office:value-type="float" office:value="-0.00000013" calcext:value-type="float">
            <text:p>-1.30E-07</text:p>
          </table:table-cell>
          <table:table-cell table:style-name="ce4" office:value-type="float" office:value="0.0000007" calcext:value-type="float">
            <text:p>7.00E-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.4" calcext:value-type="float">
            <text:p>1.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22" calcext:value-type="float">
            <text:p>22</text:p>
          </table:table-cell>
          <table:table-cell office:value-type="float" office:value="160.71" calcext:value-type="float">
            <text:p>160.71</text:p>
          </table:table-cell>
          <table:table-cell table:style-name="ce1" office:value-type="string" calcext:value-type="string">
            <text:p>47.41(ppb)</text:p>
          </table:table-cell>
          <table:table-cell office:value-type="float" office:value="-0.00000018" calcext:value-type="float">
            <text:p>-1.80E-07</text:p>
          </table:table-cell>
          <table:table-cell office:value-type="float" office:value="0.0000015" calcext:value-type="float">
            <text:p>1.50E-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45" calcext:value-type="float">
            <text:p>1.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15" calcext:value-type="float">
            <text:p>15</text:p>
          </table:table-cell>
          <table:table-cell office:value-type="float" office:value="138.419" calcext:value-type="float">
            <text:p>138.419</text:p>
          </table:table-cell>
          <table:table-cell office:value-type="string" calcext:value-type="string">
            <text:p>1.12(ppm)</text:p>
          </table:table-cell>
          <table:table-cell office:value-type="float" office:value="0.0000073" calcext:value-type="float">
            <text:p>7.30E-06</text:p>
          </table:table-cell>
          <table:table-cell office:value-type="float" office:value="0.00000081" calcext:value-type="float">
            <text:p>8.10E-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17" calcext:value-type="float">
            <text:p>17</text:p>
          </table:table-cell>
          <table:table-cell office:value-type="float" office:value="116.41" calcext:value-type="float">
            <text:p>116.41</text:p>
          </table:table-cell>
          <table:table-cell office:value-type="string" calcext:value-type="string">
            <text:p>0.67(ppm)</text:p>
          </table:table-cell>
          <table:table-cell office:value-type="float" office:value="-0.0000065" calcext:value-type="float">
            <text:p>-6.50E-06</text:p>
          </table:table-cell>
          <table:table-cell office:value-type="float" office:value="0.00000035" calcext:value-type="float">
            <text:p>3.50E-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.45" calcext:value-type="float">
            <text:p>1.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19" calcext:value-type="float">
            <text:p>19</text:p>
          </table:table-cell>
          <table:table-cell office:value-type="float" office:value="122.377" calcext:value-type="float">
            <text:p>122.377</text:p>
          </table:table-cell>
          <table:table-cell office:value-type="string" calcext:value-type="string">
            <text:p>0.42(ppm)</text:p>
          </table:table-cell>
          <table:table-cell office:value-type="float" office:value="-0.0000033" calcext:value-type="float">
            <text:p>-3.30E-06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N-14+Z*14/100.</text:p>
          </table:table-cell>
          <table:table-cell office:value-type="float" office:value="21" calcext:value-type="float">
            <text:p>21</text:p>
          </table:table-cell>
          <table:table-cell office:value-type="float" office:value="229.586" calcext:value-type="float">
            <text:p>229.586</text:p>
          </table:table-cell>
          <table:table-cell table:style-name="ce2" office:value-type="string" calcext:value-type="string">
            <text:p>33.83(ppb)</text:p>
          </table:table-cell>
          <table:table-cell office:value-type="float" office:value="-0.000000043" calcext:value-type="float">
            <text:p>-4.30E-08</text:p>
          </table:table-cell>
          <table:table-cell table:style-name="ce4" office:value-type="float" office:value="0.0000011" calcext:value-type="float">
            <text:p>1.10E-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-14+Z*14/100.</text:p>
          </table:table-cell>
          <table:table-cell office:value-type="float" office:value="22" calcext:value-type="float">
            <text:p>22</text:p>
          </table:table-cell>
          <table:table-cell office:value-type="float" office:value="321.42" calcext:value-type="float">
            <text:p>321.42</text:p>
          </table:table-cell>
          <table:table-cell office:value-type="string" calcext:value-type="string">
            <text:p>27.79(ppb)</text:p>
          </table:table-cell>
          <table:table-cell office:value-type="float" office:value="-0.000000013" calcext:value-type="float">
            <text:p>-1.30E-08</text:p>
          </table:table-cell>
          <table:table-cell office:value-type="float" office:value="0.00000088" calcext:value-type="float">
            <text:p>8.80E-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-14+Z*14/100.</text:p>
          </table:table-cell>
          <table:table-cell office:value-type="float" office:value="23" calcext:value-type="float">
            <text:p>23</text:p>
          </table:table-cell>
          <table:table-cell office:value-type="float" office:value="449.988" calcext:value-type="float">
            <text:p>449.988</text:p>
          </table:table-cell>
          <table:table-cell office:value-type="string" calcext:value-type="string">
            <text:p>24.31(ppb)</text:p>
          </table:table-cell>
          <table:table-cell office:value-type="float" office:value="-0.0000000016" calcext:value-type="float">
            <text:p>-1.60E-09</text:p>
          </table:table-cell>
          <table:table-cell office:value-type="float" office:value="0.0000015" calcext:value-type="float">
            <text:p>1.50E-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e (2)</text:p>
          </table:table-cell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-14+Z*14/100.</text:p>
          </table:table-cell>
          <table:table-cell office:value-type="float" office:value="11" calcext:value-type="float">
            <text:p>11</text:p>
          </table:table-cell>
          <table:table-cell office:value-type="float" office:value="7.93715" calcext:value-type="float">
            <text:p>7.93715</text:p>
          </table:table-cell>
          <table:table-cell office:value-type="string" calcext:value-type="string">
            <text:p>0.13(ppb)</text:p>
          </table:table-cell>
          <table:table-cell office:value-type="float" office:value="0.000000011" calcext:value-type="float">
            <text:p>1.10E-08</text:p>
          </table:table-cell>
          <table:table-cell office:value-type="float" office:value="0.0000000095" calcext:value-type="float">
            <text:p>9.50E-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 (20)</text:p>
          </table:table-cell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-14+Z*14/100.</text:p>
          </table:table-cell>
          <table:table-cell office:value-type="float" office:value="13" calcext:value-type="float">
            <text:p>13</text:p>
          </table:table-cell>
          <table:table-cell office:value-type="float" office:value="15.5568" calcext:value-type="float">
            <text:p>15.5568</text:p>
          </table:table-cell>
          <table:table-cell office:value-type="string" calcext:value-type="string">
            <text:p>250.80(ppm)</text:p>
          </table:table-cell>
          <table:table-cell office:value-type="float" office:value="-0.0034" calcext:value-type="float">
            <text:p>-3.40E-03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table:formula="of:=20*14/100" office:value-type="float" office:value="2.8" calcext:value-type="float">
            <text:p>2.8</text:p>
          </table:table-cell>
          <table:table-cell table:number-columns-repeated="3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00-00-00</text:date>, <text:time style:data-style-name="N2" text:time-value="11:18:25.1177359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2T10:48:05.534533376</meta:creation-date>
    <dc:date>2026-05-23T12:26:57.676980100</dc:date>
    <meta:editing-duration>PT22H24M50S</meta:editing-duration>
    <meta:editing-cycles>6</meta:editing-cycles>
    <meta:generator>LibreOffice/25.8.6.2$Linux_X86_64 LibreOffice_project/580$Build-2</meta:generator>
    <meta:document-statistic meta:table-count="2" meta:cell-count="264" meta:object-count="0"/>
  </office:meta>
</office:document-meta>
</file>